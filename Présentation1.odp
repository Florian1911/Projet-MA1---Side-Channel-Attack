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F9B7483D.png" manifest:media-type="image/png"/>
  <manifest:file-entry manifest:full-path="Pictures/100000010000011900000144C6B6742B.png" manifest:media-type="image/png"/>
  <manifest:file-entry manifest:full-path="Pictures/100000010000008000000148218AB04B.png" manifest:media-type="image/png"/>
  <manifest:file-entry manifest:full-path="Pictures/100000010000045F00000326FF376F6C.png" manifest:media-type="image/png"/>
  <manifest:file-entry manifest:full-path="Pictures/10000001000002ED0000022469D2B8A4.png" manifest:media-type="image/png"/>
  <manifest:file-entry manifest:full-path="Pictures/10000001000002250000029B1A3C13F9.png" manifest:media-type="image/png"/>
  <manifest:file-entry manifest:full-path="Pictures/10000001000002E80000021B3B2C4738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597cm, 0.542cm, 0.596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91cm" loext:decorative="false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width="0.053cm" svg:stroke-color="#000000" draw:marker-start-width="0.28cm" draw:marker-end="Extrémités_20_de_20_flèche_20_1" draw:marker-end-width="0.38cm" svg:stroke-linecap="butt" draw:fill="none" draw:textarea-vertical-align="middle" fo:padding-top="0.152cm" fo:padding-bottom="0.152cm" fo:padding-left="0.277cm" fo:padding-right="0.277cm" loext:decorative="false"/>
    </style:style>
    <style:style style:name="gr6" style:family="graphic" style:parent-style-name="objectwithoutfill">
      <style:graphic-properties svg:stroke-width="0.053cm" svg:stroke-color="#000000" draw:marker-start-width="0.28cm" draw:marker-end="Extrémités_20_de_20_flèche_20_2" draw:marker-end-width="0.38cm" draw:fill="none" draw:textarea-vertical-align="middle" fo:padding-top="0.152cm" fo:padding-bottom="0.152cm" fo:padding-left="0.277cm" fo:padding-right="0.27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79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2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8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3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8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1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76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2.896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9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3cm, 5.544cm, 0.871cm, -0.919cm)" draw:image-opacity="100%" style:mirror="none" loext:decorative="false"/>
    </style:style>
    <style:style style:name="gr34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pr1" style:family="presentation" style:parent-style-name="Standard-title">
      <style:graphic-properties draw:textarea-vertical-align="middle" draw:auto-grow-height="true" fo:min-height="5.675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cm" svg:height="5.675cm" svg:x="3cm" svg:y="4.641cm" presentation:class="title" presentation:user-transformed="true">
          <draw:text-box>
            <text:p text:style-name="P1"><text:span text:style-name="T1">Présentation </text:span><text:span text:style-name="T1">avancement </text:span><text:span text:style-name="T1">proj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301cm" svg:y="1cm" presentation:class="title" presentation:user-transformed="true">
          <draw:text-box>
            <text:p>Table des matiè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Explication SPA DPA CPA</text:p>
              </text:list-item>
              <text:list-item>
                <text:p>STM32</text:p>
              </text:list-item>
              <text:list-item>
                <text:p>Avancement supplémentaire</text:p>
              </text:list-item>
              <text:list-item>
                <text:p>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3" draw:layer="layout" svg:width="15.5cm" svg:height="11.272cm" svg:x="11.5cm" svg:y="2.728cm">
          <draw:image xlink:href="Pictures/10000001000002E80000021B3B2C4738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 presentation:user-transformed="true">
          <draw:text-box>
            <text:p>Simple Power Analysis</text:p>
          </draw:text-box>
        </draw:frame>
        <draw:frame draw:style-name="gr3" draw:text-style-name="P4" draw:layer="layout" svg:width="4.807cm" svg:height="0.962cm" svg:x="0.5cm" svg:y="4cm">
          <draw:text-box>
            <text:p>Exemple RSA :</text:p>
          </draw:text-box>
        </draw:frame>
        <draw:frame draw:style-name="gr4" draw:text-style-name="P4" draw:layer="layout" svg:width="2.991cm" svg:height="0.962cm" svg:x="0.509cm" svg:y="6cm">
          <draw:text-box>
            <text:p>Si bit = 0</text:p>
          </draw:text-box>
        </draw:frame>
        <draw:frame draw:style-name="gr4" draw:text-style-name="P4" draw:layer="layout" svg:width="2.991cm" svg:height="0.962cm" svg:x="0.5cm" svg:y="7.038cm">
          <draw:text-box>
            <text:p>Si bit = 1</text:p>
          </draw:text-box>
        </draw:frame>
        <draw:line draw:style-name="gr5" draw:text-style-name="P5" draw:layer="layout" svg:x1="3.5cm" svg:y1="6.5cm" svg:x2="4.5cm" svg:y2="6.5cm">
          <text:p/>
        </draw:line>
        <draw:line draw:style-name="gr6" draw:text-style-name="P3" draw:layer="layout" svg:x1="3.5cm" svg:y1="7.5cm" svg:x2="4.5cm" svg:y2="7.5cm">
          <text:p/>
        </draw:line>
        <draw:frame draw:style-name="gr7" draw:text-style-name="P4" draw:layer="layout" svg:width="2.55cm" svg:height="0.962cm" svg:x="4.95cm" svg:y="6cm">
          <draw:text-box>
            <text:p>Square</text:p>
          </draw:text-box>
        </draw:frame>
        <draw:frame draw:style-name="gr8" draw:text-style-name="P4" draw:layer="layout" svg:width="5.426cm" svg:height="0.962cm" svg:x="4.95cm" svg:y="6.962cm">
          <draw:text-box>
            <text:p>Square + Multip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9" draw:text-style-name="P4" draw:layer="layout" svg:width="6.219cm" svg:height="0.962cm" svg:x="2.487cm" svg:y="4.8cm">
          <draw:text-box>
            <text:p>1. Mesure N traces :</text:p>
          </draw:text-box>
        </draw:frame>
        <draw:frame draw:style-name="gr10" draw:text-style-name="P1" draw:layer="layout" svg:width="3.735cm" svg:height="0.541cm" svg:x="8.706cm" svg:y="5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5" draw:layer="layout" svg:width="25.199cm" svg:height="2.629cm" svg:x="1.401cm" svg:y="0.629cm" presentation:class="title" presentation:user-transformed="true">
          <draw:text-box>
            <text:p>Differential Power Analysis</text:p>
          </draw:text-box>
        </draw:frame>
        <draw:frame draw:style-name="gr11" draw:text-style-name="P4" draw:layer="layout" svg:width="9.5cm" svg:height="1.673cm" svg:x="15cm" svg:y="4.8cm">
          <draw:text-box>
            <text:p>(avec N suffisamment grand)</text:p>
          </draw:text-box>
        </draw:frame>
        <draw:frame draw:style-name="gr12" draw:text-style-name="P4" draw:layer="layout" svg:width="7.844cm" svg:height="0.962cm" svg:x="2.5cm" svg:y="5.8cm">
          <draw:text-box>
            <text:p>2. Hypothèse de sous-clé </text:p>
          </draw:text-box>
        </draw:frame>
        <draw:frame draw:style-name="gr13" draw:text-style-name="P4" draw:layer="layout" svg:width="10.456cm" svg:height="0.962cm" svg:x="2.5cm" svg:y="6.838cm">
          <draw:text-box>
            <text:p>3. Calcul d’une valeur intermédiaire</text:p>
          </draw:text-box>
        </draw:frame>
        <draw:frame draw:style-name="gr14" draw:text-style-name="P4" draw:layer="layout" svg:width="7.562cm" svg:height="0.962cm" svg:x="2.5cm" svg:y="7.9cm">
          <draw:text-box>
            <text:p>4. Séparation des traces </text:p>
          </draw:text-box>
        </draw:frame>
        <draw:frame draw:style-name="gr15" draw:text-style-name="P4" draw:layer="layout" svg:width="12.738cm" svg:height="0.962cm" svg:x="2.5cm" svg:y="9cm">
          <draw:text-box>
            <text:p>5. Analyse statistique (Difference of Means)</text:p>
          </draw:text-box>
        </draw:frame>
        <draw:frame draw:style-name="gr16" draw:text-style-name="P4" draw:layer="layout" svg:width="9.785cm" svg:height="0.962cm" svg:x="2.5cm" svg:y="10.038cm">
          <draw:text-box>
            <text:p>6. Identification de la clé correcte</text:p>
          </draw:text-box>
        </draw:frame>
        <draw:frame draw:style-name="gr10" draw:text-style-name="P1" draw:layer="layout" svg:width="3.146cm" svg:height="0.541cm" svg:x="13.5cm" svg:y="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6"><text:span text:style-name="T2">Hypothèse de sous-clé (Kj) et P_i le ième bit du plaintext</text:span></text:p>
              <text:p text:style-name="P6"><text:span text:style-name="T2">On test toutes les possibilités de clés</text:span></text:p>
              <text:p text:style-name="P6"><text:span text:style-name="T2">On regarde le bit à la sortie de la sbox b_k = bit(V)</text:span></text:p>
              <text:p text:style-name="P6"><text:span text:style-name="T2">En pratique, tjr sur le premier round ( après un byte dépend de plusieurs bytes de clé)</text:span></text:p>
              <text:p text:style-name="P6"><text:span text:style-name="T2">Séparation des traces :</text:span></text:p>
              <text:p text:style-name="P6"><text:span text:style-name="T2">Diviser les traces en deux groupes selon la valeur d’un bit intermédiaire (0 ou 1).</text:span></text:p>
              <text:p text:style-name="P6"><text:span text:style-name="T2"/></text:p>
              <text:p text:style-name="P6"><text:span text:style-name="T2">Analyse statistique (Difference of Means)</text:span></text:p>
              <text:p text:style-name="P6"><text:span text:style-name="T2">Calculer la différence moyenne entre les deux groupes :</text:span></text:p>
              <text:p text:style-name="P6"><text:span text:style-name="T2">Δ(t)=μ1(t)−μ0(t)\Delta(t) = \mu_1(t) - \mu_0(t)Δ(t)=μ1​(t)−μ0​(t) </text:span></text:p>
              <text:p text:style-name="P6"><text:span text:style-name="T2">Identification de la clé correcte</text:span></text:p>
              <text:p text:style-name="P6"><text:span text:style-name="T2">La bonne hypothèse produit un pic significatif au moment de l’exécution de la S-box.</text:span></text:p>
              <text:p text:style-name="P6"><text:span text:style-name="T2"/>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ifferential Power Analysis</text:p>
          </draw:text-box>
        </draw:frame>
        <draw:frame draw:style-name="gr17" draw:text-style-name="P4" draw:layer="layout" svg:width="8.479cm" svg:height="0.962cm" svg:x="2.8cm" svg:y="4cm">
          <draw:text-box>
            <text:p>Principe : attaque statistique</text:p>
          </draw:text-box>
        </draw:frame>
        <draw:frame draw:style-name="gr18" draw:text-style-name="P3" draw:layer="layout" svg:width="7.394cm" svg:height="8.985cm" draw:transform="skewX (0.000174532925199433) rotate (0.00139626340159546) translate (3.3cm 5.015cm)">
          <draw:image xlink:href="Pictures/10000001000002250000029B1A3C13F9.png" xlink:type="simple" xlink:show="embed" xlink:actuate="onLoad" draw:mime-type="image/png">
            <text:p/>
          </draw:image>
        </draw:frame>
        <draw:frame draw:style-name="gr18" draw:text-style-name="P3" draw:layer="layout" svg:width="11.806cm" svg:height="8.638cm" svg:x="15cm" svg:y="5.362cm">
          <draw:image xlink:href="Pictures/10000001000002ED0000022469D2B8A4.png" xlink:type="simple" xlink:show="embed" xlink:actuate="onLoad" draw:mime-type="image/png">
            <text:p/>
          </draw:image>
        </draw:frame>
        <draw:frame draw:style-name="gr19" draw:text-style-name="P4" draw:layer="layout" svg:width="7.914cm" svg:height="0.962cm" svg:x="17cm" svg:y="3.9cm">
          <draw:text-box>
            <text:p>Cible la sortie d’une S-bo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rrelation Power Analysis</text:p>
          </draw:text-box>
        </draw:frame>
        <draw:frame draw:style-name="gr9" draw:text-style-name="P4" draw:layer="layout" svg:width="6.219cm" svg:height="0.962cm" svg:x="2.487cm" svg:y="4.873cm">
          <draw:text-box>
            <text:p>1. Mesure N traces :</text:p>
          </draw:text-box>
        </draw:frame>
        <draw:frame draw:style-name="gr10" draw:text-style-name="P1" draw:layer="layout" svg:width="3.735cm" svg:height="0.541cm" svg:x="8.706cm" svg:y="5.1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4" draw:layer="layout" svg:width="9.5cm" svg:height="1.673cm" svg:x="15cm" svg:y="4.873cm">
          <draw:text-box>
            <text:p>(avec N suffisamment grand)</text:p>
          </draw:text-box>
        </draw:frame>
        <draw:frame draw:style-name="gr12" draw:text-style-name="P4" draw:layer="layout" svg:width="7.844cm" svg:height="0.962cm" svg:x="2.5cm" svg:y="5.873cm">
          <draw:text-box>
            <text:p>2. Hypothèse de sous-clé </text:p>
          </draw:text-box>
        </draw:frame>
        <draw:frame draw:style-name="gr13" draw:text-style-name="P4" draw:layer="layout" svg:width="10.456cm" svg:height="0.962cm" svg:x="2.5cm" svg:y="6.911cm">
          <draw:text-box>
            <text:p>3. Calcul d’une valeur intermédiaire</text:p>
          </draw:text-box>
        </draw:frame>
        <draw:frame draw:style-name="gr20" draw:text-style-name="P7" draw:layer="layout" svg:width="10.428cm" svg:height="0.962cm" svg:x="2.5cm" svg:y="7.973cm">
          <draw:text-box>
            <text:p><text:span text:style-name="T3">4. Application du modèle de fuite</text:span></text:p>
          </draw:text-box>
        </draw:frame>
        <draw:frame draw:style-name="gr21" draw:text-style-name="P7" draw:layer="layout" svg:width="11.089cm" svg:height="0.962cm" svg:x="2.5cm" svg:y="9.073cm">
          <draw:text-box>
            <text:p><text:span text:style-name="T3">5. Calcul de corrélation de Pearson</text:span></text:p>
          </draw:text-box>
        </draw:frame>
        <draw:frame draw:style-name="gr16" draw:text-style-name="P4" draw:layer="layout" svg:width="9.785cm" svg:height="0.962cm" svg:x="2.5cm" svg:y="10.111cm">
          <draw:text-box>
            <text:p>6. Identification de la clé correcte</text:p>
          </draw:text-box>
        </draw:frame>
        <draw:frame draw:style-name="gr22" draw:text-style-name="P4" draw:layer="layout" svg:width="10.232cm" svg:height="0.962cm" svg:x="8.884cm" svg:y="12.538cm">
          <draw:text-box>
            <text:p>Modèle de fuite : Hamming Weigh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Deep Learning – Side Channel Attacks (DL-SCA)</text:p>
          </draw:text-box>
        </draw:frame>
        <draw:frame draw:style-name="gr23" draw:text-style-name="P4" draw:layer="layout" svg:width="11.971cm" svg:height="0.962cm" svg:x="2.257cm" svg:y="6.738cm">
          <draw:text-box>
            <text:p>Classification multi-classes (256 valeurs)</text:p>
          </draw:text-box>
        </draw:frame>
        <draw:frame draw:style-name="gr24" draw:text-style-name="P4" draw:layer="layout" svg:width="7.386cm" svg:height="0.962cm" svg:x="2.214cm" svg:y="7.7cm">
          <draw:text-box>
            <text:p>Répéter l’attaque n fois</text:p>
          </draw:text-box>
        </draw:frame>
        <draw:frame draw:style-name="gr25" draw:text-style-name="P4" draw:layer="layout" svg:width="9.468cm" svg:height="0.962cm" svg:x="2.3cm" svg:y="4.9cm">
          <draw:text-box>
            <text:p>Pas de modèle de fuite explicite</text:p>
          </draw:text-box>
        </draw:frame>
        <draw:frame draw:style-name="gr26" draw:text-style-name="P4" draw:layer="layout" svg:width="0.502cm" svg:height="1.187cm" svg:x="8.1cm" svg:y="5.8cm">
          <draw:text-box>
            <text:p/>
          </draw:text-box>
        </draw:frame>
        <draw:frame draw:style-name="gr27" draw:text-style-name="P4" draw:layer="layout" svg:width="19.385cm" svg:height="0.962cm" svg:x="2.3cm" svg:y="5.8cm">
          <draw:text-box>
            <text:p text:style-name="P8"><text:span text:style-name="T4">À <text:s/>partir d’une trace, le réseau estime la probabilité que la clé soit 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8"><text:span text:style-name="T2">En DL-SCA on ne teste pas 256 hypothèses comme en CPA…</text:span></text:p>
              <text:p text:style-name="P8"><text:span text:style-name="T2">mais le réseau prédit 256 classes…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ES plus simple si Deep Learning</text:p>
          </draw:text-box>
        </draw:frame>
        <draw:frame draw:style-name="gr28" draw:text-style-name="P4" draw:layer="layout" svg:width="14.515cm" svg:height="0.962cm" svg:x="2.5cm" svg:y="8.538cm">
          <draw:text-box>
            <text:p>Très robuste au bruit et au désalignement</text:p>
          </draw:text-box>
        </draw:frame>
        <draw:frame draw:style-name="gr29" draw:text-style-name="P4" draw:layer="layout" svg:width="17.268cm" svg:height="3.095cm" svg:x="2.5cm" svg:y="5cm">
          <draw:text-box>
            <text:p><text:span text:style-name="T5">DL-SCA fonctionne mieux quand :</text:span></text:p>
            <text:list text:style-name="L4">
              <text:list-item>
                <text:p>Fuites répétitives (10 round AES-128, 16 Sbox par round)</text:p>
              </text:list-item>
              <text:list-item>
                <text:p>Opérations identiques et nombreuses</text:p>
              </text:list-item>
              <text:list-item>
                <text:p>Patterns localis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8"><text:span text:style-name="T2">Les attaques DL-SCA sont plus efficaces sur AES que sur RSA car AES présente une structure itérative régulière avec des fuites localisées et répétitives, permettant une attaque par byte.</text:span></text:p>
              <text:p text:style-name="P8"><text:span text:style-name="T2">→ Une petite partie de la clé influence une petite zone temporelle bien déinie dans la trace.</text:span></text:p>
              <text:p text:style-name="P8"><text:span text:style-name="T2"/></text:p>
              <text:p text:style-name="P8"><text:span text:style-name="T2">À l’inverse, RSA repose sur des opérations arithmétiques de grande taille, dont les fuites sont globales, moins localisées, et souvent protégées par des contre-mesures.</text:span></text:p>
              <text:p text:style-name="P8"><text:span text:style-name="T2">Le problème d’apprentissage est donc beaucoup plus structuré et de plus faible dimension dans le cas d’AES.</text:span>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STM32</text:p>
          </draw:text-box>
        </draw:frame>
        <draw:frame draw:style-name="gr18" draw:text-style-name="P3" draw:layer="layout" svg:width="3.386cm" svg:height="8.677cm" svg:x="5.3cm" svg:y="5cm">
          <draw:image xlink:href="Pictures/100000010000008000000148218AB04B.png" xlink:type="simple" xlink:show="embed" xlink:actuate="onLoad" draw:mime-type="image/png">
            <text:p/>
          </draw:image>
        </draw:frame>
        <draw:frame draw:style-name="gr18" draw:text-style-name="P3" draw:layer="layout" svg:width="7.434cm" svg:height="8.572cm" svg:x="17.266cm" svg:y="5.028cm">
          <draw:image xlink:href="Pictures/100000010000011900000144C6B6742B.png" xlink:type="simple" xlink:show="embed" xlink:actuate="onLoad" draw:mime-type="image/png">
            <text:p/>
          </draw:image>
        </draw:frame>
        <draw:frame draw:style-name="gr30" draw:text-style-name="P9" draw:layer="layout" svg:width="3.396cm" svg:height="1.673cm" svg:x="5.304cm" svg:y="3cm">
          <draw:text-box>
            <text:p text:style-name="P1">Nucleo-32</text:p>
            <text:p text:style-name="P1">G431</text:p>
          </draw:text-box>
        </draw:frame>
        <draw:frame draw:style-name="gr30" draw:text-style-name="P9" draw:layer="layout" svg:width="3.396cm" svg:height="1.673cm" svg:x="19.3cm" svg:y="3.1cm">
          <draw:text-box>
            <text:p text:style-name="P1">Nucleo-64</text:p>
            <text:p text:style-name="P1">F40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Les deux sont bon mais beaucoup plus de docu et travaux sur le F401 donc préférable</text:p>
              <text:p/>
              <text:p>https://www.st.com/en/evaluation-tools/nucleo-f401re.html#overview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ommation du STM32 F401</text:p>
          </draw:text-box>
        </draw:frame>
        <draw:frame draw:style-name="gr31" draw:text-style-name="P4" draw:layer="layout" svg:width="11.76cm" svg:height="1.673cm" svg:x="2.5cm" svg:y="5cm">
          <draw:text-box>
            <text:p>3.3 V → on mesure directement le MCU</text:p>
            <text:p/>
          </draw:text-box>
        </draw:frame>
        <draw:frame draw:style-name="gr32" draw:text-style-name="P4" draw:layer="layout" svg:width="13.079cm" svg:height="0.962cm" svg:x="2.5cm" svg:y="6.038cm">
          <draw:text-box>
            <text:p>146 <text:s/><text:span text:style-name="T6">µ</text:span>A / MHz <text:s/>=&gt; <text:s/>12,3 mA car max 84 MH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5v passe par régulateur et possible bruit mais test possible</text:p>
              <text:p>MCU = puce qui exécute l’AES</text:p>
              <text:p/>
              <text:p>https://www.st.com/en/microcontrollers-microprocessors/stm32f401re.html?utm_source=chatgpt.com</text:p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ubeIDE et CubeMX</text:p>
          </draw:text-box>
        </draw:frame>
        <draw:frame draw:style-name="gr33" draw:text-style-name="P3" draw:layer="layout" svg:width="13.463cm" svg:height="7cm" svg:x="0.237cm" svg:y="4.375cm">
          <draw:image xlink:href="Pictures/100000010000078000000438F9B7483D.png" xlink:type="simple" xlink:show="embed" xlink:actuate="onLoad" draw:mime-type="image/png">
            <text:p/>
          </draw:image>
        </draw:frame>
        <draw:frame draw:style-name="gr18" draw:text-style-name="P3" draw:layer="layout" svg:width="11.433cm" svg:height="8.235cm" svg:x="15.267cm" svg:y="3.758cm">
          <draw:image xlink:href="Pictures/100000010000045F00000326FF376F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éparation du traitement</text:p>
          </draw:text-box>
        </draw:frame>
        <draw:frame presentation:style-name="pr4" draw:layer="layout" svg:width="19.5cm" svg:height="3.315cm" svg:x="2.5cm" svg:y="5cm" presentation:class="outline" presentation:user-transformed="true">
          <draw:text-box>
            <text:list text:style-name="L2">
              <text:list-item>
                <text:p>Préparation en local (script d’entrainement)</text:p>
              </text:list-item>
              <text:list-item>
                <text:p>Création d’une V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uite</text:p>
          </draw:text-box>
        </draw:frame>
        <draw:frame presentation:style-name="pr4" draw:layer="layout" svg:width="22.5cm" svg:height="4.5cm" svg:x="2.5cm" svg:y="5cm" presentation:class="outline" presentation:user-transformed="true">
          <draw:text-box>
            <text:list text:style-name="L2">
              <text:list-item>
                <text:p>Commencer les mesures</text:p>
              </text:list-item>
              <text:list-item>
                <text:p>Trouver un modèle fiable (voir dans la littérature)</text:p>
              </text:list-item>
              <text:list-item>
                <text:p>Entraîner mon modè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éférences</text:p>
          </draw:text-box>
        </draw:frame>
        <draw:frame draw:style-name="gr34" draw:text-style-name="P10" draw:layer="layout" svg:width="21.986cm" svg:height="2.385cm" svg:x="2.514cm" svg:y="5cm">
          <draw:text-box>
            <text:p>[1] N. Vanderavero, An Introduction to Side-Channel Attacks, UMONS, 2025.</text:p>
            <text:p/>
            <text:p>[2] STMicroelectronics, RM0368 – STM32F401 Reference Manual, 2023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56cm" fo:min-width="2.26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06cm" loext:decorative="false"/>
      <style:paragraph-properties style:writing-mode="lr-tb"/>
    </style:style>
    <style:style style:name="Mpr1" style:family="presentation" style:parent-style-name="Standard-backgroundobjects">
      <style:graphic-properties svg:stroke-color="#3465a4" draw:textarea-vertical-align="middle" draw:auto-grow-height="false" fo:min-height="0.75cm" fo:min-width="28cm" loext:decorative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text-properties fo:font-size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size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7" draw:layer="backgroundobjects" svg:width="12.5cm" svg:height="0.585cm" svg:x="0cm" svg:y="15.165cm" presentation:class="footer">
        <draw:text-box>
          <text:p text:style-name="MP6"><text:span text:style-name="MT2">Projet Master 1 : </text:span><text:span text:style-name="MT3">Side</text:span><text:span text:style-name="MT2"> </text:span><text:span text:style-name="MT3">Channel</text:span><text:span text:style-name="MT2"> </text:span><text:span text:style-name="MT3">Attack</text:span><text:span text:style-name="MT2"> : </text:span><text:span text:style-name="MT3">Power</text:span><text:span text:style-name="MT2"> </text:span><text:span text:style-name="MT3">Analysis</text:span></text:p>
        </draw:text-box>
      </draw:frame>
      <draw:frame draw:style-name="Mgr3" draw:text-style-name="MP8" draw:layer="backgroundobjects" svg:width="2.76cm" svg:height="0.806cm" svg:x="25.333cm" svg:y="15cm">
        <draw:text-box>
          <text:p><text:span text:style-name="MT1"><text:page-number>&lt;numéro&gt;</text:page-number></text:span></text:p>
        </draw:text-box>
      </draw:frame>
      <draw:frame draw:style-name="Mgr4" draw:text-style-name="MP9" draw:layer="backgroundobjects" svg:width="3.806cm" svg:height="0.763cm" svg:x="18.194cm" svg:y="15cm">
        <draw:text-box>
          <text:p><text:span text:style-name="MT4">Florian Lefebvr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7:26:14.460952644</meta:creation-date>
    <meta:editing-duration>P1DT5H6M49S</meta:editing-duration>
    <meta:editing-cycles>5</meta:editing-cycles>
    <meta:generator>LibreOffice/25.8.4.2$Linux_X86_64 LibreOffice_project/580$Build-2</meta:generator>
    <dc:date>2026-02-19T23:51:25.837756137</dc:date>
    <meta:document-statistic meta:object-count="113"/>
  </office:meta>
</office:document-meta>
</file>

<file path=Object 1/content.xml><?xml version="1.0" encoding="utf-8"?>
<math xmlns="http://www.w3.org/1998/Math/MathML" display="block">
  <semantics>
    <mrow>
      <msub>
        <mi>T</mi>
        <mn>1</mn>
      </msub>
      <mrow>
        <mo fence="true" form="prefix" stretchy="false">(</mo>
        <mrow>
          <mi>t</mi>
        </mrow>
        <mo fence="true" form="postfix" stretchy="false">)</mo>
      </mrow>
      <mi>,</mi>
      <msub>
        <mi>T</mi>
        <mn>2</mn>
      </msub>
      <mrow>
        <mo fence="true" form="prefix" stretchy="false">(</mo>
        <mrow>
          <mi>t</mi>
        </mrow>
        <mo fence="true" form="postfix" stretchy="false">)</mo>
      </mrow>
      <mi>,</mi>
      <mn>...</mn>
      <mi>,</mi>
      <msub>
        <mi>T</mi>
        <mi>N</mi>
      </msub>
      <mrow>
        <mo fence="true" form="prefix" stretchy="false">(</mo>
        <mrow>
          <mi>t</mi>
        </mrow>
        <mo fence="true" form="postfix" stretchy="false">)</mo>
      </mrow>
    </mrow>
    <annotation encoding="StarMath 5.0">T_1(t),T_2(t),...,T_N(t)</annotation>
  </semantics>
</math>
</file>

<file path=Object 2/content.xml><?xml version="1.0" encoding="utf-8"?>
<math xmlns="http://www.w3.org/1998/Math/MathML" display="block">
  <semantics>
    <mrow>
      <msub>
        <mi>T</mi>
        <mn>1</mn>
      </msub>
      <mrow>
        <mo fence="true" form="prefix" stretchy="false">(</mo>
        <mrow>
          <mi>t</mi>
        </mrow>
        <mo fence="true" form="postfix" stretchy="false">)</mo>
      </mrow>
      <mi>,</mi>
      <msub>
        <mi>T</mi>
        <mn>2</mn>
      </msub>
      <mrow>
        <mo fence="true" form="prefix" stretchy="false">(</mo>
        <mrow>
          <mi>t</mi>
        </mrow>
        <mo fence="true" form="postfix" stretchy="false">)</mo>
      </mrow>
      <mi>,</mi>
      <mn>...</mn>
      <mi>,</mi>
      <msub>
        <mi>T</mi>
        <mi>N</mi>
      </msub>
      <mrow>
        <mo fence="true" form="prefix" stretchy="false">(</mo>
        <mrow>
          <mi>t</mi>
        </mrow>
        <mo fence="true" form="postfix" stretchy="false">)</mo>
      </mrow>
    </mrow>
    <annotation encoding="StarMath 5.0">T_1(t),T_2(t),...,T_N(t)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i mathvariant="italic">SBox</mi>
      </mrow>
      <mrow>
        <mo fence="true" form="prefix" stretchy="false">(</mo>
        <mrow>
          <mrow>
            <msub>
              <mi>P</mi>
              <mi>i</mi>
            </msub>
            <mo stretchy="false">⊕</mo>
            <msub>
              <mi>K</mi>
              <mi>j</mi>
            </msub>
          </mrow>
        </mrow>
        <mo fence="true" form="postfix" stretchy="false">)</mo>
      </mrow>
    </mrow>
    <annotation encoding="StarMath 5.0">V= SBox ( P_i oplus K_j )</annotation>
  </semantics>
</math>
</file>