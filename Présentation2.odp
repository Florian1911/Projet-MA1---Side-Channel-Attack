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C000001C04D0228FA.png" manifest:media-type="image/png"/>
  <manifest:file-entry manifest:full-path="Pictures/1000F1D60000298C000024479AB95AC2.svg" manifest:media-type="image/svg+xml"/>
  <manifest:file-entry manifest:full-path="Pictures/10000001000001920000015FB4EF0E07.png" manifest:media-type="image/png"/>
  <manifest:file-entry manifest:full-path="Pictures/1000F0770000298C00001F36C94E5DDA.svg" manifest:media-type="image/svg+xml"/>
  <manifest:file-entry manifest:full-path="Pictures/10000001000001920000012E79138F0A.png" manifest:media-type="image/png"/>
  <manifest:file-entry manifest:full-path="Pictures/100000010000034500000256133A1454.png" manifest:media-type="image/png"/>
  <manifest:file-entry manifest:full-path="Pictures/1000000100000578000002406EB1D906.png" manifest:media-type="image/png"/>
  <manifest:file-entry manifest:full-path="Pictures/10000001000003AC000000DEE199B7BD.png" manifest:media-type="image/png"/>
  <manifest:file-entry manifest:full-path="Pictures/100A565000008B020000635271FF531C.svg" manifest:media-type="image/svg+xml"/>
  <manifest:file-entry manifest:full-path="Pictures/100000010000047E00000341377F326A.png" manifest:media-type="image/png"/>
  <manifest:file-entry manifest:full-path="Pictures/100000010000057800000348D0B62A5D.png" manifest:media-type="image/png"/>
  <manifest:file-entry manifest:full-path="Pictures/1000000000000600000008003584EA6E.jpg" manifest:media-type="image/jpeg"/>
  <manifest:file-entry manifest:full-path="Pictures/10000001000005DC00000249231922A0.png" manifest:media-type="image/png"/>
  <manifest:file-entry manifest:full-path="Pictures/10000001000004DC000001D68EB2FE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5cm, 12.904cm, 4.504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3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66cm, 0cm, 1.781cm, 0.418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2cm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4.7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43cm" loext:decorative="false"/>
      <style:paragraph-properties style:writing-mode="lr-tb"/>
    </style:style>
    <style:style style:name="gr19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1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7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07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2cm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6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8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09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42cm, 0cm, 8.544cm, 0cm)" draw:image-opacity="100%" style:mirror="non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93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62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237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1.76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23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1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362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23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944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6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2cm" loext:decorative="false"/>
      <style:paragraph-properties style:writing-mode="lr-tb"/>
    </style:style>
    <style:style style:name="gr50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6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03cm" loext:decorative="false"/>
      <style:paragraph-properties style:writing-mode="lr-tb"/>
    </style:style>
    <style:style style:name="pr1" style:family="presentation" style:parent-style-name="Standard-title">
      <style:graphic-properties draw:textarea-vertical-align="middle" draw:auto-grow-height="true" fo:min-height="5.675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cm" svg:height="5.675cm" svg:x="3cm" svg:y="4.641cm" presentation:class="title" presentation:user-transformed="true">
          <draw:text-box>
            <text:p text:style-name="P1"><text:span text:style-name="T1">Prés</text:span><text:span text:style-name="T1">entati</text:span><text:span text:style-name="T1">on </text:span><text:span text:style-name="T1">avan</text:span><text:span text:style-name="T1">ceme</text:span><text:span text:style-name="T1">nt </text:span><text:span text:style-name="T1">proj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ow Side vs High Side</text:p>
          </draw:text-box>
        </draw:frame>
        <draw:frame draw:style-name="gr2" draw:text-style-name="P3" draw:layer="layout" svg:width="10.635cm" svg:height="9.286cm" svg:x="1.665cm" svg:y="3.5cm">
          <draw:image xlink:href="Pictures/1000F1D60000298C000024479AB95AC2.svg" xlink:type="simple" xlink:show="embed" xlink:actuate="onLoad" draw:mime-type="image/svg+xml">
            <text:p/>
          </draw:image>
          <draw:image xlink:href="Pictures/10000001000001920000015FB4EF0E07.png" xlink:type="simple" xlink:show="embed" xlink:actuate="onLoad" draw:mime-type="image/png"/>
        </draw:frame>
        <draw:frame draw:style-name="gr3" draw:text-style-name="P4" draw:layer="layout" svg:width="2.549cm" svg:height="0.962cm" svg:x="9.751cm" svg:y="9.108cm">
          <draw:text-box>
            <text:p>STM32</text:p>
          </draw:text-box>
        </draw:frame>
        <draw:frame draw:style-name="gr2" draw:text-style-name="P3" draw:layer="layout" svg:width="10.635cm" svg:height="7.989cm" svg:x="15.6cm" svg:y="3.511cm">
          <draw:image xlink:href="Pictures/1000F0770000298C00001F36C94E5DDA.svg" xlink:type="simple" xlink:show="embed" xlink:actuate="onLoad" draw:mime-type="image/svg+xml">
            <text:p/>
          </draw:image>
          <draw:image xlink:href="Pictures/10000001000001920000012E79138F0A.png" xlink:type="simple" xlink:show="embed" xlink:actuate="onLoad" draw:mime-type="image/png"/>
        </draw:frame>
        <draw:frame draw:style-name="gr3" draw:text-style-name="P4" draw:layer="layout" svg:width="2.549cm" svg:height="0.962cm" svg:x="23.651cm" svg:y="11.538cm">
          <draw:text-box>
            <text:p>STM32</text:p>
          </draw:text-box>
        </draw:frame>
        <draw:frame draw:style-name="gr4" draw:text-style-name="P4" draw:layer="layout" svg:width="3.114cm" svg:height="0.962cm" svg:x="5.886cm" svg:y="13cm">
          <draw:text-box>
            <text:p>Low Side</text:p>
          </draw:text-box>
        </draw:frame>
        <draw:frame draw:style-name="gr5" draw:text-style-name="P4" draw:layer="layout" svg:width="3.255cm" svg:height="0.962cm" svg:x="19.886cm" svg:y="13.038cm">
          <draw:text-box>
            <text:p>High Sid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onde différentielle ?</text:p>
              <text:p/>
              <text:p>Gnd qui part dans le pc</text:p>
              <text:p/>
              <text:p>Pas l’alim du pico</text:p>
              <text:p/>
              <text:p/>
            </draw:text-box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remiers tests</text:p>
          </draw:text-box>
        </draw:frame>
        <draw:frame draw:style-name="gr6" draw:text-style-name="P3" draw:layer="layout" svg:width="7cm" svg:height="7.999cm" svg:x="1.5cm" svg:y="4.5cm">
          <draw:image xlink:href="Pictures/1000000000000600000008003584EA6E.jpg" xlink:type="simple" xlink:show="embed" xlink:actuate="onLoad" draw:mime-type="image/jpeg">
            <text:p/>
          </draw:image>
        </draw:frame>
        <draw:frame draw:style-name="gr7" draw:text-style-name="P4" draw:layer="layout" svg:width="15.984cm" svg:height="0.962cm" svg:x="9.016cm" svg:y="3.538cm">
          <draw:text-box>
            <text:p>Utilisation d’un Trigger pour synchroniser le chiffrement</text:p>
          </draw:text-box>
        </draw:frame>
        <draw:frame draw:style-name="gr8" draw:text-style-name="P4" draw:layer="layout" svg:width="17.939cm" svg:height="0.962cm" svg:x="9.09cm" svg:y="5cm">
          <draw:text-box>
            <text:p>Consommation de courant entre 0,05 et 0,06 A (pour la carte) </text:p>
          </draw:text-box>
        </draw:frame>
        <draw:frame draw:style-name="gr9" draw:text-style-name="P3" draw:layer="layout" svg:width="12.5cm" svg:height="7.578cm" svg:x="9cm" svg:y="6.922cm">
          <draw:image xlink:href="Pictures/100000010000047E00000341377F326A.png" xlink:type="simple" xlink:show="embed" xlink:actuate="onLoad" draw:mime-type="image/png">
            <text:p/>
          </draw:image>
        </draw:frame>
        <draw:frame draw:style-name="gr10" draw:text-style-name="P4" draw:layer="layout" svg:width="1.808cm" svg:height="0.962cm" svg:x="23cm" svg:y="10cm">
          <draw:text-box>
            <text:p>RSA</text:p>
          </draw:text-box>
        </draw:frame>
        <draw:frame draw:style-name="gr11" draw:text-style-name="P4" draw:layer="layout" svg:width="5.602cm" svg:height="0.962cm" svg:x="21.898cm" svg:y="11.538cm">
          <draw:text-box>
            <text:p>R_Shunt = 1 Ohm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Pas d’influence, dans notre cas car bon matériel (picoscope)</text:p>
            </draw:text-box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3" draw:layer="layout" svg:width="25.199cm" svg:height="2.629cm" svg:x="1.401cm" svg:y="0.629cm" presentation:class="title" presentation:user-transformed="true">
          <draw:text-box>
            <text:p>Pipeline CPA - Résumé</text:p>
          </draw:text-box>
        </draw:frame>
        <draw:frame draw:style-name="gr12" draw:text-style-name="P4" draw:layer="layout" svg:width="9cm" svg:height="5cm" svg:x="4.5cm" svg:y="4cm">
          <draw:text-box>
            <text:list text:style-name="L3">
              <text:list-item>
                <text:p><text:span text:style-name="T2"><text:s/>Acquisition</text:span></text:p>
              </text:list-item>
              <text:list-item>
                <text:p><text:span text:style-name="T2"><text:s/>Prétraitement (jitter)</text:span></text:p>
              </text:list-item>
              <text:list-item>
                <text:p><text:span text:style-name="T2"><text:s/>Calcul des POI</text:span></text:p>
              </text:list-item>
              <text:list-item>
                <text:p><text:span text:style-name="T2"><text:s/>Hypothèses de clé</text:span></text:p>
              </text:list-item>
            </text:list>
          </draw:text-box>
        </draw:frame>
        <draw:frame draw:style-name="gr13" draw:text-style-name="P4" draw:layer="layout" svg:width="8.361cm" svg:height="3.083cm" svg:x="14.5cm" svg:y="4cm">
          <draw:text-box>
            <text:p text:style-name="P5"><text:span text:style-name="T2"><text:s/>5) Corrélation</text:span></text:p>
            <text:p text:style-name="P5"><text:span text:style-name="T2"><text:s/>6) Décision de la clé</text:span></text:p>
            <text:p text:style-name="P5"><text:span text:style-name="T2"><text:s/>7) Validation</text:span></text:p>
          </draw:text-box>
        </draw:frame>
        <draw:frame draw:style-name="gr14" draw:text-style-name="P1" draw:layer="layout" svg:width="24.87cm" svg:height="5.873cm" svg:x="1.5cm" svg:y="8.5cm">
          <draw:image xlink:href="Pictures/10000001000003AC000000DEE199B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3" draw:layer="layout" svg:width="25.199cm" svg:height="2.629cm" svg:x="1.402cm" svg:y="0.63cm" presentation:class="title" presentation:user-transformed="true">
          <draw:text-box>
            <text:p>AES – known key</text:p>
          </draw:text-box>
        </draw:frame>
        <draw:frame draw:style-name="gr15" draw:text-style-name="P6" draw:layer="layout" svg:width="7.543cm" svg:height="0.962cm" svg:x="2.357cm" svg:y="3.5cm">
          <draw:text-box>
            <text:p><text:span text:style-name="T3">POI = Points Of Interests</text:span></text:p>
          </draw:text-box>
        </draw:frame>
        <draw:frame draw:style-name="gr16" draw:text-style-name="P8" draw:layer="layout" svg:width="16.034cm" svg:height="0.962cm" svg:x="2.357cm" svg:y="4.5cm">
          <draw:text-box>
            <text:p text:style-name="P7"><text:span text:style-name="T4">Instants où la fuite d’information est maximale.</text:span></text:p>
          </draw:text-box>
        </draw:frame>
        <draw:frame draw:style-name="gr17" draw:text-style-name="P9" draw:layer="layout" svg:width="10.49cm" svg:height="0.962cm" svg:x="1.9cm" svg:y="10.2cm">
          <draw:text-box>
            <text:p><text:span text:style-name="T5">POI calculé en connaissant la clé</text:span></text:p>
          </draw:text-box>
        </draw:frame>
        <draw:frame draw:style-name="gr18" draw:text-style-name="P9" draw:layer="layout" svg:width="10.243cm" svg:height="0.962cm" svg:x="13.5cm" svg:y="10.2cm">
          <draw:text-box>
            <text:p><text:span text:style-name="T5">On retrouve « facilement » la clé</text:span></text:p>
          </draw:text-box>
        </draw:frame>
        <draw:line draw:style-name="gr19" draw:text-style-name="P3" draw:layer="layout" svg:x1="12.356cm" svg:y1="10.7cm" svg:x2="13.5cm" svg:y2="10.7cm">
          <text:p/>
        </draw:line>
        <draw:frame draw:style-name="gr20" draw:text-style-name="P4" draw:layer="layout" svg:width="24.117cm" svg:height="0.962cm" svg:x="2.383cm" svg:y="6.538cm">
          <draw:text-box>
            <text:p>Pour chaque échantillon, on calcule la corrélation entre la trace et le modèle de fui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lassement des hypothèses de clé</text:p>
          </draw:text-box>
        </draw:frame>
        <draw:frame draw:style-name="gr21" draw:text-style-name="P4" draw:layer="layout" svg:width="5.337cm" svg:height="0.962cm" svg:x="4.7cm" svg:y="4.257cm">
          <draw:text-box>
            <text:p>Pour les essais : </text:p>
          </draw:text-box>
        </draw:frame>
        <draw:frame draw:style-name="gr22" draw:text-style-name="P4" draw:layer="layout" svg:width="11.5cm" svg:height="0.962cm" svg:x="5.7cm" svg:y="6.181cm">
          <draw:text-box>
            <text:p>Rank calculé par rapport à la vraie clé</text:p>
          </draw:text-box>
        </draw:frame>
        <draw:frame draw:style-name="gr23" draw:text-style-name="P4" draw:layer="layout" svg:width="9.079cm" svg:height="0.962cm" svg:x="4.7cm" svg:y="8.5cm">
          <draw:text-box>
            <text:p>Pour les attaques (blind key) : </text:p>
          </draw:text-box>
        </draw:frame>
        <draw:frame draw:style-name="gr24" draw:text-style-name="P4" draw:layer="layout" svg:width="8.937cm" svg:height="0.962cm" svg:x="4.701cm" svg:y="4.257cm">
          <draw:text-box>
            <text:p>Pour les essais (known key) : </text:p>
          </draw:text-box>
        </draw:frame>
        <draw:frame draw:style-name="gr25" draw:text-style-name="P4" draw:layer="layout" svg:width="10.572cm" svg:height="1.077cm" svg:x="5.728cm" svg:y="10.923cm">
          <draw:text-box>
            <text:p text:style-name="P7"><text:span text:style-name="T6">S(k)=∣ρ(HW(SBOX[p⊕k]),y)∣</text:span></text:p>
          </draw:text-box>
        </draw:frame>
        <draw:frame draw:style-name="gr26" draw:text-style-name="P4" draw:layer="layout" svg:width="5.902cm" svg:height="0.962cm" svg:x="5.8cm" svg:y="12.038cm">
          <draw:text-box>
            <text:p>Plus S(k) est grand</text:p>
          </draw:text-box>
        </draw:frame>
        <draw:frame draw:style-name="gr22" draw:text-style-name="P4" draw:layer="layout" svg:width="5.5cm" svg:height="0.962cm" svg:x="5.7cm" svg:y="5.219cm">
          <draw:text-box>
            <text:p>Vraie clé connue</text:p>
          </draw:text-box>
        </draw:frame>
        <draw:line draw:style-name="gr27" draw:text-style-name="P3" draw:layer="layout" svg:x1="11.8cm" svg:y1="12.5cm" svg:x2="12.8cm" svg:y2="12.5cm">
          <text:p/>
        </draw:line>
        <draw:frame draw:style-name="gr28" draw:text-style-name="P4" draw:layer="layout" svg:width="10.669cm" svg:height="0.962cm" svg:x="13.002cm" svg:y="12.038cm">
          <draw:text-box>
            <text:p>Plus l’hypothèse de clé est probable</text:p>
          </draw:text-box>
        </draw:frame>
        <draw:frame draw:style-name="gr22" draw:text-style-name="P4" draw:layer="layout" svg:width="5.95cm" svg:height="0.962cm" svg:x="5.75cm" svg:y="10cm">
          <draw:text-box>
            <text:p>Vraie clé inconnu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Pas d’influence, dans notre cas car bon matériel (picoscope)</text:p>
            </draw:text-box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nalyse de la fuite</text:p>
          </draw:text-box>
        </draw:frame>
        <draw:frame draw:style-name="gr29" draw:text-style-name="P4" draw:layer="layout" svg:width="12.114cm" svg:height="0.962cm" svg:x="5cm" svg:y="4.638cm">
          <draw:text-box>
            <text:p>Idée : Analyser des systèmes simple</text:p>
          </draw:text-box>
        </draw:frame>
        <draw:frame draw:style-name="gr30" draw:text-style-name="P4" draw:layer="layout" svg:width="8.284cm" svg:height="3.095cm" svg:x="5cm" svg:y="6.8cm">
          <draw:text-box>
            <text:list text:style-name="L3">
              <text:list-item>
                <text:p>XOR</text:p>
              </text:list-item>
              <text:list-item>
                <text:p>XOR + SBOX sur 1 byte</text:p>
              </text:list-item>
              <text:list-item>
                <text:p>XOR + SBOX sur 4 byte</text:p>
              </text:list-item>
              <text:list-item>
                <text:p>XOR + SBOX sur 16 byte</text:p>
              </text:list-item>
            </text:list>
          </draw:text-box>
        </draw:frame>
        <draw:frame draw:style-name="gr31" draw:text-style-name="P4" draw:layer="layout" svg:width="9.609cm" svg:height="0.962cm" svg:x="16cm" svg:y="7.8cm">
          <draw:text-box>
            <text:p>Typique des fuites d’un vrai A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Pas d’influence, dans notre cas car bon matériel (picoscope)</text:p>
            </draw:text-box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3" draw:layer="layout" svg:width="25.199cm" svg:height="2.629cm" svg:x="1.401cm" svg:y="0.629cm" presentation:class="title" presentation:user-transformed="true">
          <draw:text-box>
            <text:p>CPA</text:p>
          </draw:text-box>
        </draw:frame>
        <draw:frame draw:style-name="gr2" draw:text-style-name="P3" draw:layer="layout" svg:width="13.37cm" svg:height="5.5cm" svg:x="14.63cm" svg:y="5cm">
          <draw:image xlink:href="Pictures/1000000100000578000002406EB1D906.png" xlink:type="simple" xlink:show="embed" xlink:actuate="onLoad" draw:mime-type="image/png">
            <text:p/>
          </draw:image>
        </draw:frame>
        <draw:frame draw:style-name="gr32" draw:text-style-name="P3" draw:layer="layout" svg:width="14.589cm" svg:height="3.499cm" svg:x="0.411cm" svg:y="6.001cm">
          <draw:image xlink:href="Pictures/100A565000008B020000635271FF531C.svg" xlink:type="simple" xlink:show="embed" xlink:actuate="onLoad" draw:mime-type="image/svg+xml">
            <text:p/>
          </draw:image>
          <draw:image xlink:href="Pictures/100000010000034500000256133A1454.png" xlink:type="simple" xlink:show="embed" xlink:actuate="onLoad" draw:mime-type="image/png"/>
        </draw:frame>
        <draw:frame draw:style-name="gr33" draw:text-style-name="P4" draw:layer="layout" svg:width="6.272cm" svg:height="0.962cm" svg:x="2.5cm" svg:y="3.538cm">
          <draw:text-box>
            <text:p>v=SBOX(pt[0]⊕k[0])</text:p>
          </draw:text-box>
        </draw:frame>
        <draw:frame draw:style-name="gr34" draw:text-style-name="P4" draw:layer="layout" svg:width="5.676cm" svg:height="0.683cm" svg:x="18.824cm" svg:y="4.317cm">
          <draw:text-box>
            <text:p><text:span text:style-name="T7">AES-step 1-byte converg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3" draw:layer="layout" svg:width="25.199cm" svg:height="2.629cm" svg:x="1.401cm" svg:y="0.629cm" presentation:class="title" presentation:user-transformed="true">
          <draw:text-box>
            <text:p>CPA</text:p>
          </draw:text-box>
        </draw:frame>
        <draw:frame draw:style-name="gr2" draw:text-style-name="P3" draw:layer="layout" svg:width="12.168cm" svg:height="7.3cm" svg:x="1.367cm" svg:y="5cm">
          <draw:image xlink:href="Pictures/100000010000057800000348D0B62A5D.png" xlink:type="simple" xlink:show="embed" xlink:actuate="onLoad" draw:mime-type="image/png">
            <text:p/>
          </draw:image>
        </draw:frame>
        <draw:frame draw:style-name="gr2" draw:text-style-name="P3" draw:layer="layout" svg:width="13.078cm" svg:height="5.1cm" svg:x="13.979cm" svg:y="6.5cm">
          <draw:image xlink:href="Pictures/10000001000005DC00000249231922A0.png" xlink:type="simple" xlink:show="embed" xlink:actuate="onLoad" draw:mime-type="image/png">
            <text:p/>
          </draw:image>
        </draw:frame>
        <draw:frame draw:style-name="gr35" draw:text-style-name="P4" draw:layer="layout" svg:width="5.893cm" svg:height="0.683cm" svg:x="18.607cm" svg:y="6.6cm">
          <draw:text-box>
            <text:p><text:span text:style-name="T7">AES-step 16-byte converg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3" draw:layer="layout" svg:width="25.199cm" svg:height="2.629cm" svg:x="1.402cm" svg:y="0.63cm" presentation:class="title" presentation:user-transformed="true">
          <draw:text-box>
            <text:p>AES - known key</text:p>
          </draw:text-box>
        </draw:frame>
        <draw:frame draw:style-name="gr2" draw:text-style-name="P3" draw:layer="layout" svg:width="17.999cm" svg:height="6.799cm" svg:x="5.001cm" svg:y="5.201cm">
          <draw:image xlink:href="Pictures/10000001000004DC000001D68EB2FE8B.png" xlink:type="simple" xlink:show="embed" xlink:actuate="onLoad" draw:mime-type="image/png">
            <text:p/>
          </draw:image>
        </draw:frame>
        <draw:frame draw:style-name="gr36" draw:text-style-name="P6" draw:layer="layout" svg:width="3.62cm" svg:height="0.683cm" svg:x="12.19cm" svg:y="4.5cm">
          <draw:text-box>
            <text:p><text:span text:style-name="T7">AES converg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3" draw:layer="layout" svg:width="25.199cm" svg:height="2.629cm" svg:x="1.402cm" svg:y="0.63cm" presentation:class="title" presentation:user-transformed="true">
          <draw:text-box>
            <text:p>AES - unknown key</text:p>
          </draw:text-box>
        </draw:frame>
        <draw:frame draw:style-name="gr37" draw:text-style-name="P10" draw:layer="layout" svg:width="2.725cm" svg:height="0.962cm" svg:x="12.5cm" svg:y="3.538cm">
          <draw:text-box>
            <text:p><text:span text:style-name="T8">ECHEC</text:span></text:p>
          </draw:text-box>
        </draw:frame>
        <draw:frame draw:style-name="gr38" draw:text-style-name="P4" draw:layer="layout" svg:width="18.362cm" svg:height="0.962cm" svg:x="4.638cm" svg:y="5.038cm">
          <draw:text-box>
            <text:p>Fuite présente mais trop faible pour casser entièrement un AES</text:p>
          </draw:text-box>
        </draw:frame>
        <draw:frame draw:style-name="gr39" draw:text-style-name="P4" draw:layer="layout" svg:width="10.737cm" svg:height="3.095cm" svg:x="2cm" svg:y="8cm">
          <draw:text-box>
            <text:p>Low-side (Deep Learning) :</text:p>
            <text:p/>
            <text:p>2/16 byte : rank &lt; 10</text:p>
            <text:p>1/16 byte : rank &lt; 5</text:p>
          </draw:text-box>
        </draw:frame>
        <draw:frame draw:style-name="gr40" draw:text-style-name="P11" draw:layer="layout" svg:width="15.584cm" svg:height="2.013cm" svg:x="12.916cm" svg:y="12.487cm">
          <draw:text-box>
            <text:p text:style-name="P7"><text:span text:style-name="T9">ranks par byte: [210, 94, 27, 1, 245, 10, 196, 254, 133, 10, 17, 247, 250, 178, 184, 211]</text:span></text:p>
            <text:p text:style-name="P7"><text:span text:style-name="T10"/></text:p>
          </draw:text-box>
        </draw:frame>
        <draw:frame draw:style-name="gr41" draw:text-style-name="P4" draw:layer="layout" svg:width="10.737cm" svg:height="3.806cm" svg:x="14.901cm" svg:y="8.001cm">
          <draw:text-box>
            <text:p>High-side (CPA) :</text:p>
            <text:p/>
            <text:p>5/16 byte : rank &lt; 30</text:p>
            <text:p>3/16 byte : rank <text:span text:style-name="T11">≤</text:span> 10</text:p>
            <text:p>1/16 byte : rank = 1</text:p>
          </draw:text-box>
        </draw:frame>
        <draw:frame draw:style-name="gr42" draw:text-style-name="P4" draw:layer="layout" svg:width="5.619cm" svg:height="0.962cm" svg:x="11.1cm" svg:y="6.5cm">
          <draw:text-box>
            <text:p>Meilleurs résultat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3" draw:layer="layout" svg:width="25.199cm" svg:height="2.629cm" svg:x="1.402cm" svg:y="0.63cm" presentation:class="title" presentation:user-transformed="true">
          <draw:text-box>
            <text:p>AES - unknown key</text:p>
          </draw:text-box>
        </draw:frame>
        <draw:frame draw:style-name="gr43" draw:text-style-name="P10" draw:layer="layout" svg:width="7.312cm" svg:height="0.962cm" svg:x="10.144cm" svg:y="4.038cm">
          <draw:text-box>
            <text:p><text:span text:style-name="T8">En ajustant la fenêtre :</text:span></text:p>
          </draw:text-box>
        </draw:frame>
        <draw:frame draw:style-name="gr44" draw:text-style-name="P4" draw:layer="layout" svg:width="6.862cm" svg:height="4.517cm" svg:x="0.263cm" svg:y="6.694cm">
          <draw:text-box>
            <text:p><text:span text:style-name="T4">[768,1536]</text:span> (CPA) :</text:p>
            <text:p/>
            <text:p>4/16 byte : rank &lt; 20</text:p>
            <text:p>2/16 byte : rank = 1</text:p>
            <text:p/>
            <text:p>Rank moyen =  115.19</text:p>
          </draw:text-box>
        </draw:frame>
        <draw:frame draw:style-name="gr45" draw:text-style-name="P4" draw:layer="layout" svg:width="6.737cm" svg:height="4.517cm" svg:x="10.363cm" svg:y="6.695cm">
          <draw:text-box>
            <text:p><text:span text:style-name="T4">[1024,1792]</text:span> (CPA) :</text:p>
            <text:p/>
            <text:p>3/16 byte : rank &lt; 20</text:p>
            <text:p>2/16 byte : rank = 1</text:p>
            <text:p/>
            <text:p>Rank moyen =  86.38</text:p>
          </draw:text-box>
        </draw:frame>
        <draw:frame draw:style-name="gr45" draw:text-style-name="P4" draw:layer="layout" svg:width="6.737cm" svg:height="4.517cm" svg:x="19.963cm" svg:y="6.695cm">
          <draw:text-box>
            <text:p><text:span text:style-name="T4">[0,2000] full</text:span> (CPA) :</text:p>
            <text:p/>
            <text:p>3/16 byte : rank &lt; 20</text:p>
            <text:p>1/16 byte : rank = 1</text:p>
            <text:p/>
            <text:p>Rank moyen =  91.12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layer="layout" svg:width="25.199cm" svg:height="2.629cm" svg:x="1.402cm" svg:y="0.63cm" presentation:class="title" presentation:user-transformed="true">
          <draw:text-box>
            <text:p>Conclusion</text:p>
          </draw:text-box>
        </draw:frame>
        <draw:frame draw:style-name="gr46" draw:text-style-name="P4" draw:layer="layout" svg:width="8.444cm" svg:height="2.384cm" svg:x="8.7cm" svg:y="4.2cm">
          <draw:text-box>
            <text:p>- Fuite existante</text:p>
            <text:p>- Pipeline fonctionnel</text:p>
            <text:p>- Attaque known key réussie</text:p>
          </draw:text-box>
        </draw:frame>
        <draw:frame draw:style-name="gr47" draw:text-style-name="P10" draw:layer="layout" svg:width="2.09cm" svg:height="1cm" svg:x="9.11cm" svg:y="7.2cm">
          <draw:text-box>
            <text:p><text:span text:style-name="T8">MAIS</text:span></text:p>
          </draw:text-box>
        </draw:frame>
        <draw:frame draw:style-name="gr48" draw:text-style-name="P4" draw:layer="layout" svg:width="7.986cm" svg:height="0.962cm" svg:x="8.731cm" svg:y="8.7cm">
          <draw:text-box>
            <text:p>- Attaque blind key échoue</text:p>
          </draw:text-box>
        </draw:frame>
        <draw:frame draw:style-name="gr49" draw:text-style-name="P4" draw:layer="layout" svg:width="4.702cm" svg:height="0.962cm" svg:x="7.8cm" svg:y="10.538cm">
          <draw:text-box>
            <text:p>Mauvais signal</text:p>
          </draw:text-box>
        </draw:frame>
        <draw:line draw:style-name="gr50" draw:text-style-name="P3" draw:layer="layout" svg:x1="12.8cm" svg:y1="11cm" svg:x2="14.098cm" svg:y2="11cm">
          <text:p/>
        </draw:line>
        <draw:frame draw:style-name="gr51" draw:text-style-name="P4" draw:layer="layout" svg:width="5.16cm" svg:height="0.962cm" svg:x="14.8cm" svg:y="10.6cm">
          <draw:text-box>
            <text:p>POI mal estimé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layer="layout" svg:width="25.199cm" svg:height="2.629cm" svg:x="1.403cm" svg:y="0.631cm" presentation:class="title" presentation:user-transformed="true">
          <draw:text-box>
            <text:p>RSA - SPA</text:p>
          </draw:text-box>
        </draw:frame>
        <draw:frame draw:style-name="gr52" draw:text-style-name="P4" draw:layer="layout" svg:width="11.336cm" svg:height="0.962cm" svg:x="0.6cm" svg:y="4cm">
          <draw:text-box>
            <text:p>Premiers résultats : 13/23 bits corrects</text:p>
          </draw:text-box>
        </draw:frame>
        <draw:frame draw:style-name="gr53" draw:text-style-name="P4" draw:layer="layout" svg:width="7.703cm" svg:height="0.962cm" svg:x="0.574cm" svg:y="5.538cm">
          <draw:text-box>
            <text:p>Meilleur fenêtrage : 16/23</text:p>
          </draw:text-box>
        </draw:frame>
        <draw:frame draw:style-name="gr2" draw:text-style-name="P3" draw:layer="layout" svg:width="18.734cm" svg:height="7.978cm" svg:x="8.766cm" svg:y="6.5cm">
          <draw:image xlink:href="Pictures/100000010000041C000001C04D0228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56cm" fo:min-width="2.26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06cm" loext:decorative="false"/>
      <style:paragraph-properties style:writing-mode="lr-tb"/>
    </style:style>
    <style:style style:name="Mpr1" style:family="presentation" style:parent-style-name="Standard-backgroundobjects">
      <style:graphic-properties svg:stroke-color="#3465a4" draw:textarea-vertical-align="middle" draw:auto-grow-height="false" fo:min-height="0.75cm" fo:min-width="28cm" loext:decorative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 draw:fill-color="#ffffff"/>
      <style:text-properties fo:font-size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font-size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7" draw:layer="backgroundobjects" svg:width="12.5cm" svg:height="0.585cm" svg:x="0cm" svg:y="15.165cm" presentation:class="footer">
        <draw:text-box>
          <text:p text:style-name="MP6"><text:span text:style-name="MT2">Projet Master 1 : </text:span><text:span text:style-name="MT3">Side</text:span><text:span text:style-name="MT2"> </text:span><text:span text:style-name="MT3">Channel</text:span><text:span text:style-name="MT2"> </text:span><text:span text:style-name="MT3">Attack</text:span><text:span text:style-name="MT2"> : </text:span><text:span text:style-name="MT3">Power</text:span><text:span text:style-name="MT2"> </text:span><text:span text:style-name="MT3">Analysis</text:span></text:p>
        </draw:text-box>
      </draw:frame>
      <draw:frame draw:style-name="Mgr3" draw:text-style-name="MP8" draw:layer="backgroundobjects" svg:width="2.76cm" svg:height="0.806cm" svg:x="25.333cm" svg:y="15cm">
        <draw:text-box>
          <text:p><text:span text:style-name="MT1"><text:page-number>&lt;numéro&gt;</text:page-number></text:span></text:p>
        </draw:text-box>
      </draw:frame>
      <draw:frame draw:style-name="Mgr4" draw:text-style-name="MP9" draw:layer="backgroundobjects" svg:width="3.806cm" svg:height="0.763cm" svg:x="18.194cm" svg:y="15cm">
        <draw:text-box>
          <text:p><text:span text:style-name="MT4">Florian Lefebvr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7:26:14.460952644</meta:creation-date>
    <meta:editing-duration>P2DT8H41M20S</meta:editing-duration>
    <meta:editing-cycles>19</meta:editing-cycles>
    <meta:generator>LibreOffice/25.8.6.2$Linux_X86_64 LibreOffice_project/580$Build-2</meta:generator>
    <dc:date>2026-04-09T17:07:32.114992827</dc:date>
    <meta:document-statistic meta:object-count="126"/>
  </office:meta>
</office:document-meta>
</file>